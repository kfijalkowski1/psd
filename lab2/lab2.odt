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7000003A58F57542FF54090DF.png" manifest:media-type="image/png"/>
  <manifest:file-entry manifest:full-path="Pictures/100000010000035C000001A13996B21529DB602F.png" manifest:media-type="image/png"/>
  <manifest:file-entry manifest:full-path="Pictures/10000001000002C10000011292B286A957BBBB3A.png" manifest:media-type="image/png"/>
  <manifest:file-entry manifest:full-path="Pictures/100000010000035C000001A10039D4A9E6AC2C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2" text:anchor-type="char" svg:width="17cm" svg:height="8.243cm" draw:z-index="1"><draw:image xlink:href="Pictures/100000010000035C000001A10039D4A9E6AC2CB4.png" xlink:type="simple" xlink:show="embed" xlink:actuate="onLoad" draw:mime-type="image/png"/></draw:frame><draw:frame draw:style-name="fr1" draw:name="Image4" text:anchor-type="char" svg:x="-0.476cm" svg:y="11.195cm" svg:width="17cm" svg:height="6.606cm" draw:z-index="3"><draw:image xlink:href="Pictures/10000001000002C10000011292B286A957BBBB3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cm" svg:y="-0.677cm" svg:width="17cm" svg:height="8.243cm" draw:z-index="0"><draw:image xlink:href="Pictures/100000010000035C000001A13996B21529DB602F.png" xlink:type="simple" xlink:show="embed" xlink:actuate="onLoad" draw:mime-type="image/png"/></draw:frame><text:soft-page-break/></text:p>
      <text:p text:style-name="Standard"><draw:frame draw:style-name="fr1" draw:name="Image3" text:anchor-type="char" svg:x="0.079cm" svg:y="3.112cm" svg:width="17cm" svg:height="11.88cm" draw:z-index="2"><draw:image xlink:href="Pictures/1000000100000537000003A58F57542FF54090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4T14:31:32.342367335</meta:creation-date>
    <dc:date>2026-05-14T14:57:50.730827651</dc:date>
    <meta:editing-duration>PT26M20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